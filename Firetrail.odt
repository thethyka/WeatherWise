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845a" officeooo:paragraph-rsid="0010845a"/>
    </style:style>
    <style:style style:name="P2" style:family="paragraph" style:parent-style-name="Standard">
      <style:text-properties officeooo:rsid="00110970" officeooo:paragraph-rsid="0011097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09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ur question we are answering is:</text:p>
      <text:p text:style-name="P1">Question: How can we automatically generate information for people who are affected by an ongoing incident?</text:p>
      <text:p text:style-name="P1"/>
      <text:p text:style-name="P1"/>
      <text:p text:style-name="P1">Problem: <text:span text:style-name="T2">Currently, users already have to access to </text:span>information for ongoing incidents <text:span text:style-name="T2">through the Emergency WA website</text:span>, however, the information <text:span text:style-name="T2">it provides</text:span> is very general and the user<text:span text:style-name="T2">s</text:span> themselves have to figure out <text:span text:style-name="T2">which</text:span> information is relevant to them, and <text:span text:style-name="T2">which isn’t</text:span>. In a stressful situation <text:span text:style-name="T2">like an emergency</text:span>, this task gets very overwhelming <text:span text:style-name="T2">and users may skip over critical information for them,</text:span></text:p>
      <text:p text:style-name="P1"/>
      <text:p text:style-name="P1">Solution: <text:span text:style-name="T2">We have created Firetrail, a website that</text:span> create<text:span text:style-name="T2">s</text:span> personalised evacuations plans for users during emergencies. We use the language powers of OpenAI’s chatGPT to automatically generate custom evacuation plans and advice for our users, <text:span text:style-name="T2">that are tailored to their specific needs</text:span>. <text:span text:style-name="T1">start demoing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5T11:04:39.561130819</meta:creation-date>
    <dc:date>2023-06-26T13:09:19.126410075</dc:date>
    <meta:editing-duration>P1DT1H10M58S</meta:editing-duration>
    <meta:editing-cycles>1</meta:editing-cycles>
    <meta:document-statistic meta:table-count="0" meta:image-count="0" meta:object-count="0" meta:page-count="1" meta:paragraph-count="4" meta:word-count="129" meta:character-count="844" meta:non-whitespace-character-count="719"/>
    <meta:generator>LibreOffice/7.3.7.2$Linux_X86_64 LibreOffice_project/30$Build-2</meta:generator>
  </office:meta>
</office:document-meta>
</file>