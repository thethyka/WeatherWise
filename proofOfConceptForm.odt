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d38d" officeooo:paragraph-rsid="0002d38d"/>
    </style:style>
    <style:style style:name="P2" style:family="paragraph" style:parent-style-name="Standard">
      <style:text-properties officeooo:rsid="0002d38d" officeooo:paragraph-rsid="0003d045"/>
    </style:style>
    <style:style style:name="P3" style:family="paragraph" style:parent-style-name="Standard">
      <style:text-properties officeooo:rsid="0002d38d" officeooo:paragraph-rsid="00040050"/>
    </style:style>
    <style:style style:name="P4" style:family="paragraph" style:parent-style-name="Standard">
      <style:text-properties officeooo:rsid="0002d38d" officeooo:paragraph-rsid="00048bcf"/>
    </style:style>
    <style:style style:name="P5" style:family="paragraph" style:parent-style-name="Standard">
      <style:text-properties officeooo:rsid="00040050" officeooo:paragraph-rsid="00040517"/>
    </style:style>
    <style:style style:name="P6" style:family="paragraph" style:parent-style-name="Standard">
      <style:text-properties officeooo:rsid="00040517" officeooo:paragraph-rsid="00040517"/>
    </style:style>
    <style:style style:name="P7" style:family="paragraph" style:parent-style-name="Standard">
      <style:text-properties officeooo:rsid="00048bcf" officeooo:paragraph-rsid="00048bcf"/>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1">
      <style:paragraph-properties fo:margin-top="0cm" fo:margin-bottom="0cm" style:contextual-spacing="false"/>
      <style:text-properties officeooo:paragraph-rsid="00048bcf"/>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text-properties officeooo:rsid="00040517" officeooo:paragraph-rsid="00040517"/>
    </style:style>
    <style:style style:name="P20" style:family="paragraph" style:parent-style-name="Text_20_body" style:list-style-name="L1">
      <style:paragraph-properties fo:margin-top="0cm" fo:margin-bottom="0cm" style:contextual-spacing="false"/>
      <style:text-properties officeooo:rsid="00048bcf" officeooo:paragraph-rsid="00048bcf"/>
    </style:style>
    <style:style style:name="T1" style:family="text">
      <style:text-properties officeooo:rsid="0003d04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0517"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040517"/>
    </style:style>
    <style:style style:name="T7" style:family="text">
      <style:text-properties officeooo:rsid="00048bc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Demonstratable Success Criteria:</text:span></text:p>
      <text:p text:style-name="P4"/>
      <text:p text:style-name="P4">Use live data feeds provided by DFES.</text:p>
      <text:p text:style-name="P4">• Support 10 concurrent DFES users in metropolitan Perth.</text:p>
      <text:p text:style-name="P4">• Operate on either Apple or Android smart phones on the 4G/5G</text:p>
      <text:p text:style-name="P4">mobile network. </text:p>
      <text:p text:style-name="P4">• Not require users to download or install files/applications on the</text:p>
      <text:p text:style-name="P4">device.</text:p>
      <text:p text:style-name="P4">• Respond to user inputs within 3 seconds.</text:p>
      <text:p text:style-name="P4">• All functions should operate with a 80% success rate. <text:line-break/></text:p>
      <text:p text:style-name="P4"/>
      <text:p text:style-name="P4">Team Name: </text:p>
      <text:p text:style-name="P1"/>
      <text:p text:style-name="P1">Firetrail</text:p>
      <text:p text:style-name="P1"/>
      <text:p text:style-name="P1">Team Lead: Conor Bennett</text:p>
      <text:p text:style-name="P1"/>
      <text:p text:style-name="P1">Team Members: …..</text:p>
      <text:p text:style-name="P1"/>
      <text:p text:style-name="P1">ABN: ……</text:p>
      <text:p text:style-name="P1"/>
      <text:p text:style-name="P2">Description of Solution: </text:p>
      <text:p text:style-name="P3">Firetrail is our team’s approach to <text:span text:style-name="T1">create personalised evacuation plans and support for people affected by ongoing emergencies. This is done by integrating 3 components; a map, an AI-assisted conversation, and a routing system. </text:span></text:p>
      <text:p text:style-name="P3"/>
      <text:p text:style-name="P5">When the user opens Firetrail, they are first asked to input their location, or use their current location. Once this is selected, they are able to see their location on a map of Western Australia. On this map, all ongoing emergencies are visualised, with coloured polygons showing the different danger level areas of <text:span text:style-name="T2">Advice</text:span>, <text:span text:style-name="T2">Watch and Act, and Emergency Warning. </text:span><text:span text:style-name="T5">The current danger level the user is in is indicated also. Alongside this, t</text:span><text:span text:style-name="T3">he various evacuation centres are also visualised on the map. </text:span><text:span text:style-name="T4">From this map, the user may</text:span><text:span text:style-name="T1">, the user may click a ‘Chat Support’ button, and is taken to a </text:span>chat messaging page.</text:p>
      <text:p text:style-name="P5"/>
      <text:p text:style-name="P5">An initial first message is shown to the user that describes <text:span text:style-name="T6">a summarised explanation of the current emergency, and then the user is prompted to answer a set of 5 questions asked to better understand their situation. While answering a question, they may either type the answer, use speech to text, or select one of the 3 given suggested responses. Once all questions are answered, ChatGPT is used to generate a custom evacuation plan for the user, that incorporates the known information about the emergency, the general evacuation advice and the user’s answers to the questions. These 3 pieces of information are fed into ChatGPT to generate a personalised, succinct, relevant evacuation plan custom to the user. The user may continue to chat with the bot for more advice, or can click on the ‘Select Evacuation Centre’ button to start the routing system.</text:span></text:p>
      <text:p text:style-name="P5"/>
      <text:p text:style-name="P6">If this button is clicked, the user is taken back to the maps page and the ideal evacuation center for the user to go to is highlighted. The user may also select alternate evacuation centres if desired. Once selected, a custom route is generated to take the user to the evacuation centre while avoiding the emergency and closed roads. The user may also return to the chat page to re-read their personal evacuation advice.</text:p>
      <text:p text:style-name="P6"/>
      <text:p text:style-name="P6">Timeline: 3 or 4 months:</text:p>
      <text:p text:style-name="P6"><text:soft-page-break/></text:p>
      <text:p text:style-name="P6">Effort (hours) broken down per feature:</text:p>
      <text:p text:style-name="P6"/>
      <text:p text:style-name="P19">Map (75)</text:p>
      <text:list xml:id="list128610889" text:style-name="L1">
        <text:list-item>
          <text:p text:style-name="P9">Google map embed - 10hrs </text:p>
          <text:list>
            <text:list-item>
              <text:p text:style-name="P20">Google maps integrated into the website that shows the map of Western Australia</text:p>
            </text:list-item>
          </text:list>
        </text:list-item>
        <text:list-item>
          <text:p text:style-name="P9">Polygons / <text:span text:style-name="T7">locations</text:span> on <text:span text:style-name="T7">map </text:span>- 5 hrs </text:p>
          <text:list>
            <text:list-item>
              <text:p text:style-name="P20">Emergencies need to be dynamically drawn onto the map for each emergency, </text:p>
            </text:list-item>
          </text:list>
        </text:list-item>
        <text:list-item>
          <text:p text:style-name="P10">Markers for location - 5hrs </text:p>
        </text:list-item>
        <text:list-item>
          <text:p text:style-name="P9">Evac Points - 5hrs </text:p>
          <text:list>
            <text:list-item>
              <text:p text:style-name="P9">Interaction with backend database </text:p>
              <text:list>
                <text:list-item>
                  <text:p text:style-name="P9">Need polling of DFES data </text:p>
                </text:list-item>
              </text:list>
            </text:list-item>
          </text:list>
        </text:list-item>
        <text:list-item>
          <text:p text:style-name="P9">Alert Info - 4hrs </text:p>
        </text:list-item>
        <text:list-item>
          <text:p text:style-name="P9">Chat button - 2 hrs </text:p>
        </text:list-item>
        <text:list-item>
          <text:p text:style-name="P9">Banner - 2hrs </text:p>
        </text:list-item>
        <text:list-item>
          <text:p text:style-name="P9">Settings - 2 hrs </text:p>
        </text:list-item>
        <text:list-item>
          <text:p text:style-name="P9">Help - 2 hrs </text:p>
        </text:list-item>
        <text:list-item>
          <text:p text:style-name="P9">Location search </text:p>
          <text:list>
            <text:list-item>
              <text:p text:style-name="P9">UI - 8 hours </text:p>
            </text:list-item>
            <text:list-item>
              <text:p text:style-name="P9">Integration with multiple APIs required 12 hours </text:p>
            </text:list-item>
          </text:list>
        </text:list-item>
        <text:list-item>
          <text:p text:style-name="P9">Select location by clicking - 6 hours </text:p>
        </text:list-item>
        <text:list-item>
          <text:p text:style-name="P9">Legend - 4 hours </text:p>
        </text:list-item>
        <text:list-item>
          <text:p text:style-name="P8">Click on emergency / evac popup - 8 hours </text:p>
        </text:list-item>
      </text:list>
      <text:p text:style-name="Text_20_body">Backend (59)</text:p>
      <text:list xml:id="list1413928076" text:style-name="L2">
        <text:list-item>
          <text:p text:style-name="P12">Set up db - 3 hours </text:p>
        </text:list-item>
        <text:list-item>
          <text:p text:style-name="P12">Integration with main roads data directly * (?) </text:p>
        </text:list-item>
        <text:list-item>
          <text:p text:style-name="P12">Integration with local roads data directly </text:p>
        </text:list-item>
        <text:list-item>
          <text:p text:style-name="P12">Dealing with road closures </text:p>
        </text:list-item>
        <text:list-item>
          <text:p text:style-name="P12">Integration with live DFES emergency data - 25 hours </text:p>
          <text:list>
            <text:list-item>
              <text:p text:style-name="P12">Evacuation centers </text:p>
            </text:list-item>
            <text:list-item>
              <text:p text:style-name="P12">Emergencies </text:p>
            </text:list-item>
            <text:list-item>
              <text:p text:style-name="P12">Road closures </text:p>
            </text:list-item>
          </text:list>
        </text:list-item>
        <text:list-item>
          <text:p text:style-name="P12">Question for each emergency - 4hrs </text:p>
        </text:list-item>
        <text:list-item>
          <text:p text:style-name="P12">Commonly suggested completions - 4hrs </text:p>
        </text:list-item>
        <text:list-item>
          <text:p text:style-name="P12">Generated emergency description prompt - 5 hrs </text:p>
        </text:list-item>
        <text:list-item>
          <text:p text:style-name="P12">Chat Logs / log stores - 10 hours </text:p>
        </text:list-item>
        <text:list-item>
          <text:p text:style-name="P12">Admin dashboard </text:p>
          <text:list>
            <text:list-item>
              <text:p text:style-name="P11">Custom UI and user friendliness - 8 hours </text:p>
            </text:list-item>
          </text:list>
        </text:list-item>
      </text:list>
      <text:p text:style-name="Text_20_body">Chat (40)</text:p>
      <text:list xml:id="list506544049" text:style-name="L3">
        <text:list-item>
          <text:p text:style-name="P14">Chat pull-up card - 10 hours </text:p>
        </text:list-item>
        <text:list-item>
          <text:p text:style-name="P14">Chat dialogues - 6 hours </text:p>
        </text:list-item>
        <text:list-item>
          <text:p text:style-name="P14">Whisper API - 3 hours </text:p>
        </text:list-item>
        <text:list-item>
          <text:p text:style-name="P14">Input box - 2 hours </text:p>
        </text:list-item>
        <text:list-item>
          <text:p text:style-name="P14">Chat flow architecture pipeline - 15 hours </text:p>
          <text:list>
            <text:list-item>
              <text:p text:style-name="P14"><text:soft-page-break/>Polish, case management, chat completions, prompt engineering </text:p>
            </text:list-item>
          </text:list>
        </text:list-item>
        <text:list-item>
          <text:p text:style-name="P13">Generate route message + button - 4 hours </text:p>
        </text:list-item>
      </text:list>
      <text:p text:style-name="Text_20_body">Routing (42)</text:p>
      <text:list xml:id="list4071348375" text:style-name="L4">
        <text:list-item>
          <text:p text:style-name="P16">Visualisation - 15 hours </text:p>
        </text:list-item>
        <text:list-item>
          <text:p text:style-name="P16">State management - 1st vs 2nd map - 10 hours </text:p>
        </text:list-item>
        <text:list-item>
          <text:p text:style-name="P16">Generating routes - 15 hours </text:p>
          <text:list>
            <text:list-item>
              <text:p text:style-name="P16">Account for road closures &amp; avoid zones </text:p>
            </text:list-item>
            <text:list-item>
              <text:p text:style-name="P16">ETA - 2 hours </text:p>
            </text:list-item>
          </text:list>
        </text:list-item>
        <text:list-item>
          <text:p text:style-name="P16">Modes of transport - 4 hours </text:p>
        </text:list-item>
        <text:list-item>
          <text:p text:style-name="P16">Open in Google maps - 2 hours </text:p>
        </text:list-item>
        <text:list-item>
          <text:p text:style-name="P15">Selecting evac centers - 5 hours </text:p>
        </text:list-item>
      </text:list>
      <text:p text:style-name="Text_20_body">Overall (37)</text:p>
      <text:list xml:id="list2267697408" text:style-name="L5">
        <text:list-item>
          <text:p text:style-name="P18">Testing + bug fixing </text:p>
          <text:list>
            <text:list-item>
              <text:p text:style-name="P18">Map - 6 hours </text:p>
            </text:list-item>
            <text:list-item>
              <text:p text:style-name="P18">Chat - 6 hours </text:p>
            </text:list-item>
            <text:list-item>
              <text:p text:style-name="P18">Backend - 6 hours </text:p>
            </text:list-item>
            <text:list-item>
              <text:p text:style-name="P18">Routing - 6 hours </text:p>
            </text:list-item>
          </text:list>
        </text:list-item>
        <text:list-item>
          <text:p text:style-name="P18">Handover </text:p>
          <text:list>
            <text:list-item>
              <text:p text:style-name="P18">Documentation - 10 hours over all features </text:p>
            </text:list-item>
            <text:list-item>
              <text:p text:style-name="P18">Deployment (hosting) - 3 hours </text:p>
            </text:list-item>
          </text:list>
        </text:list-item>
        <text:list-item>
          <text:p text:style-name="P18">Credit Pricing </text:p>
          <text:list>
            <text:list-item>
              <text:p text:style-name="P18">OpenAI credits </text:p>
            </text:list-item>
            <text:list-item>
              <text:p text:style-name="P17">Google API credits </text:p>
            </text:list-item>
          </text:list>
        </text:list-item>
      </text:list>
      <text:p text:style-name="P6"/>
      <text:p text:style-name="P6"/>
      <text:p text:style-name="P7">Pricing: $90/h * x hours = y</text:p>
      <text:p text:style-name="P7">*please note that this hourly rate takes into account that all hours billed do NOT include any research or learning time for how to code the feature into account. All time estimation for features is the estimated time it takes to complete the feature assuming the developer already understands how to implement the feature. It is also worth mentioning that several members of our team have previous professional software development experience.</text:p>
      <text:p text:style-name="P7"/>
      <text:p text:style-name="P7">Constraints and assumptions:</text:p>
      <text:p text:style-name="P7">users are assumed to be using the Chrome browser</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7T16:47:04.816043950</meta:creation-date>
    <dc:date>2023-10-07T18:45:33.537747790</dc:date>
    <meta:editing-duration>PT1M25S</meta:editing-duration>
    <meta:editing-cycles>1</meta:editing-cycles>
    <meta:document-statistic meta:table-count="0" meta:image-count="0" meta:object-count="0" meta:page-count="3" meta:paragraph-count="89" meta:word-count="919" meta:character-count="5045" meta:non-whitespace-character-count="4210"/>
    <meta:generator>LibreOffice/7.3.7.2$Linux_X86_64 LibreOffice_project/30$Build-2</meta:generator>
  </office:meta>
</office:document-meta>
</file>